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404888A2B1E.png" manifest:media-type="image/png"/>
  <manifest:file-entry manifest:full-path="Pictures/10000000000005A00000040440CD3E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2" text:anchor-type="char" svg:width="17.59cm" svg:height="12.555cm" draw:z-index="1"><draw:image xlink:href="Pictures/10000000000005A00000040440CD3EB2.png" xlink:type="simple" xlink:show="embed" xlink:actuate="onLoad" draw:mime-type="image/png"/></draw:frame></text:p>
      <text:p text:style-name="P1"><draw:frame draw:style-name="fr1" draw:name="Imagen1" text:anchor-type="char" svg:width="17.59cm" svg:height="12.555cm" draw:z-index="0"><draw:image xlink:href="Pictures/10000001000005A000000404888A2B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3T17:33:43.431482885</meta:creation-date>
    <dc:date>2026-04-23T17:36:28.843002841</dc:date>
    <meta:editing-duration>PT2M47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26.2.2.2$Linux_X86_64 LibreOffice_project/620$Build-2</meta:generator>
  </office:meta>
</office:document-meta>
</file>